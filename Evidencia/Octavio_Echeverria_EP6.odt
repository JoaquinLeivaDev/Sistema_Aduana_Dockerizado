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D00000375D3E4B19B.png" manifest:media-type="image/png"/>
  <manifest:file-entry manifest:full-path="Pictures/1000000100000460000001A45EBC4757.png" manifest:media-type="image/png"/>
  <manifest:file-entry manifest:full-path="Pictures/1000000100000241000002F1A5CBE1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a96" officeooo:paragraph-rsid="00151a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><draw:frame draw:style-name="fr1" draw:name="Imagen1" text:anchor-type="char" svg:width="17.59cm" svg:height="6.595cm" draw:z-index="0"><draw:image xlink:href="Pictures/1000000100000460000001A45EBC4757.png" xlink:type="simple" xlink:show="embed" xlink:actuate="onLoad" draw:mime-type="image/png"/></draw:frame>Desactivado contextload turo service</text:p>
      <text:p text:style-name="P1"/>
      <text:p text:style-name="P1"><draw:frame draw:style-name="fr2" draw:name="Imagen3" text:anchor-type="char" svg:x="-0.953cm" svg:y="0.161cm" svg:width="17.59cm" svg:height="13.003cm" draw:z-index="1"><draw:image xlink:href="Pictures/10000001000004AD00000375D3E4B19B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n2" text:anchor-type="char" svg:x="1.702cm" svg:y="0.328cm" svg:width="12.213cm" svg:height="15.939cm" draw:z-index="2"><draw:image xlink:href="Pictures/1000000100000241000002F1A5CBE1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21:50:25.465091500</meta:creation-date>
    <dc:date>2026-06-24T22:06:33.282612100</dc:date>
    <meta:editing-duration>PT5M18S</meta:editing-duration>
    <meta:editing-cycles>1</meta:editing-cycles>
    <meta:document-statistic meta:table-count="0" meta:image-count="3" meta:object-count="0" meta:page-count="2" meta:paragraph-count="1" meta:word-count="4" meta:character-count="36" meta:non-whitespace-character-count="33"/>
    <meta:generator>LibreOffice/26.2.4.2$Windows_X86_64 LibreOffice_project/0229ac93fcf0d7cbc6376066c6f35021cef002dc</meta:generator>
  </office:meta>
</office:document-meta>
</file>